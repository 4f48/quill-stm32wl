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co2" style:family="table-column">
      <style:table-column-properties fo:break-before="auto" style:column-width="4.281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2.2339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16.6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1, C3</text:p>
          </table:table-cell>
          <table:table-cell office:value-type="string" calcext:value-type="string">
            <text:p>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XT155R71E104KE01D</text:p>
          </table:table-cell>
          <table:table-cell office:value-type="string" calcext:value-type="string">
            <text:p><text:a xlink:href="https://mou.sr/3ReCbrt" xlink:type="simple">https://mou.sr/3ReCbrt</text:a></text:p>
          </table:table-cell>
        </table:table-row>
        <table:table-row table:style-name="ro1">
          <table:table-cell office:value-type="string" calcext:value-type="string">
            <text:p>C2, C5, C6, C7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RM188Z71A106KA73D</text:p>
          </table:table-cell>
          <table:table-cell office:value-type="string" calcext:value-type="string">
            <text:p><text:a xlink:href="https://mou.sr/3QT9dgV" xlink:type="simple">https://mou.sr/3QT9dgV</text:a>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GRM155C80J475MEAAJ</text:p>
          </table:table-cell>
          <table:table-cell office:value-type="string" calcext:value-type="string">
            <text:p><text:a xlink:href="https://mou.sr/4tpjte7" xlink:type="simple">https://mou.sr/4tpjte7</text:a>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5819WS</text:p>
          </table:table-cell>
          <table:table-cell office:value-type="string" calcext:value-type="string">
            <text:p><text:a xlink:href="https://www.digikey.com/en/products/detail/shenzhen-slkormicro-semicon-co-ltd/1N5819WS/26112850" xlink:type="simple">https://www.digikey.com/en/products/detail/shenzhen-slkormicro-semicon-co-ltd/1N5819WS/26112850</text:a>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PHHS1005SECK</text:p>
          </table:table-cell>
          <table:table-cell office:value-type="string" calcext:value-type="string">
            <text:p><text:a xlink:href="https://mou.sr/4tAjQTp" xlink:type="simple">https://mou.sr/4tAjQTp</text:a>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<text:a xlink:href="https://mou.sr/3F3o9Qf" xlink:type="simple">https://mou.sr/3F3o9Qf</text:a>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ST_PH_S2B-PH-SM4-TB_1x02-1MP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ountingPin</text:p>
          </table:table-cell>
          <table:table-cell office:value-type="string" calcext:value-type="string">
            <text:p>S2B-PH-SM4-TB(LF)(SN)</text:p>
          </table:table-cell>
          <table:table-cell office:value-type="string" calcext:value-type="string">
            <text:p><text:a xlink:href="https://mou.sr/4uEPik3" xlink:type="simple">https://mou.sr/4uEPik3</text:a>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_SH_BM04B-SRSS-TB_1x04-1MP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ountingPin</text:p>
          </table:table-cell>
          <table:table-cell office:value-type="string" calcext:value-type="string">
            <text:p>BM04B-SRSS-TB(LF)(SN)</text:p>
          </table:table-cell>
          <table:table-cell office:value-type="string" calcext:value-type="string">
            <text:p><text:a xlink:href="https://mou.sr/4nlOzC0" xlink:type="simple">https://mou.sr/4nlOzC0</text:a>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_SH_BM03B-SRSS-TB_1x03-1MP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ountingPin</text:p>
          </table:table-cell>
          <table:table-cell office:value-type="string" calcext:value-type="string">
            <text:p>BM03B-SRSS-TB(LF)(SN)</text:p>
          </table:table-cell>
          <table:table-cell office:value-type="string" calcext:value-type="string">
            <text:p><text:a xlink:href="https://mou.sr/3PbSNQ8" xlink:type="simple">https://mou.sr/3PbSNQ8</text:a>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O3401A</text:p>
          </table:table-cell>
          <table:table-cell office:value-type="string" calcext:value-type="string">
            <text:p><text:a xlink:href="https://www.digikey.hu/short/twfrrn3w" xlink:type="simple">https://www.digikey.hu/short/twfrrn3w</text:a></text:p>
          </table:table-cell>
        </table:table-row>
        <table:table-row table:style-name="ro1">
          <table:table-cell office:value-type="string" calcext:value-type="string">
            <text:p>R1, R2, R5, R6, R8</text:p>
          </table:table-cell>
          <table:table-cell office:value-type="string" calcext:value-type="string">
            <text:p>0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C0402JR-7D10KL</text:p>
          </table:table-cell>
          <table:table-cell office:value-type="string" calcext:value-type="string">
            <text:p><text:a xlink:href="https://mou.sr/3Qyq83Z" xlink:type="simple">https://mou.sr/3Qyq83Z</text:a></text:p>
          </table:table-cell>
        </table:table-row>
        <table:table-row table:style-name="ro1">
          <table:table-cell office:value-type="string" calcext:value-type="string">
            <text:p>R10, R7, R9</text:p>
          </table:table-cell>
          <table:table-cell office:value-type="string" calcext:value-type="string">
            <text:p>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C0402JR-075K1P</text:p>
          </table:table-cell>
          <table:table-cell office:value-type="string" calcext:value-type="string">
            <text:p><text:a xlink:href="https://mou.sr/4djlcvs" xlink:type="simple">https://mou.sr/4djlcvs</text:a></text:p>
          </table:table-cell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RC0402JR-0722RL</text:p>
          </table:table-cell>
          <table:table-cell office:value-type="string" calcext:value-type="string">
            <text:p><text:a xlink:href="https://mou.sr/3WMWZH5" xlink:type="simple">https://mou.sr/3WMWZH5</text:a>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SPST_PTS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TS810SJM250SMTR LFS</text:p>
          </table:table-cell>
          <table:table-cell office:value-type="string" calcext:value-type="string">
            <text:p><text:a xlink:href="https://mou.sr/4v3Dg4j" xlink:type="simple">https://mou.sr/4v3Dg4j</text:a>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SPST_PTS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PTS810SJM250SMTR LFS</text:p>
          </table:table-cell>
          <table:table-cell office:value-type="string" calcext:value-type="string">
            <text:p><text:a xlink:href="https://mou.sr/4v3Dg4j" xlink:type="simple">https://mou.sr/4v3Dg4j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AK3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K3172-T-8-SM-I</text:p>
          </table:table-cell>
          <table:table-cell office:value-type="string" calcext:value-type="string">
            <text:p><text:a xlink:href="https://www.lcsc.com/product-detail/C19723908.html?s_z=n_q_rak3172-t-8-sm-i&amp;lcsc_vid=Q1FaUAcAEldbAwVQElFXV1UFQQNeAQFRE1cKAQFTQAUxVlNRT1deVVZRQ1FbVzsOAxUeFF5JWBYZEEoKFBINSQcJGk4%3D" xlink:type="simple">https://www.lcsc.com/product-detail/C19723908.html?s_z=n_q_rak3172-t-8-sm-i&amp;lcsc_vid=Q1FaUAcAEldbAwVQElFXV1UFQQNeAQFRE1cKAQFTQAUxVlNRT1deVVZRQ1FbVzsOAxUeFF5JWBYZEEoKFBINSQcJGk4%3D</text:a>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340E</text:p>
          </table:table-cell>
          <table:table-cell office:value-type="string" calcext:value-type="string">
            <text:p><text:a xlink:href="https://www.lcsc.com/product-detail/C99652.html?s_z=n_q_CH340E&amp;lcsc_vid=Q1FaUAcAEldbAwVQElFXV1UFQQNeAQFRE1cKAQFTQAUxVlNRT1deVVZfT1ReVjsOAxUeFF5JWBYZEEoKFBINSQcJGk4eFQsCAgIaSgADAwAHC0slRlhZVVdfR1lADxALGw%3D%3D" xlink:type="simple">https://www.lcsc.com/product-detail/C99652.html?s_z=n_q_CH340E&amp;lcsc_vid=Q1FaUAcAEldbAwVQElFXV1UFQQNeAQFRE1cKAQFTQAUxVlNRT1deVVZfT1ReVjsOAxUeFF5JWBYZEEoKFBINSQcJGk4eFQsCAgIaSgADAwAHC0slRlhZVVdfR1lADxALGw%3D%3D</text:a>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<text:a xlink:href="https://mou.sr/41TpKUl" xlink:type="simple">https://mou.sr/41TpKUl</text:a>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<text:a xlink:href="https://mou.sr/3ThCNeY" xlink:type="simple">https://mou.sr/3ThCNeY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8:09:40.807127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70e089b17412e4cb7773e41413306b17a2328c34</meta:generator>
    <dc:date>2026-05-12T18:29:31.575319918</dc:date>
    <meta:editing-duration>PT46M59S</meta:editing-duration>
    <meta:editing-cycles>59</meta:editing-cycles>
    <meta:document-statistic meta:table-count="1" meta:cell-count="120" meta:object-count="0"/>
  </office:meta>
</office:document-meta>
</file>