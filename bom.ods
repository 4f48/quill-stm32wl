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1.322in"/>
    </style:style>
    <style:style style:name="co2" style:family="table-column">
      <style:table-column-properties fo:break-before="auto" style:column-width="4.2819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2.2339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6.448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1, C3</text:p>
          </table:table-cell>
          <table:table-cell office:value-type="string" calcext:value-type="string">
            <text:p>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XT155R71E104KE01D</text:p>
          </table:table-cell>
          <table:table-cell office:value-type="string" calcext:value-type="string">
            <text:p><text:a xlink:href="https://mou.sr/3ReCbrt" xlink:type="simple">https://mou.sr/3ReCbrt</text:a></text:p>
          </table:table-cell>
        </table:table-row>
        <table:table-row table:style-name="ro1">
          <table:table-cell office:value-type="string" calcext:value-type="string">
            <text:p>C2, C5, C6, C7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GRM188Z71A106KA73D</text:p>
          </table:table-cell>
          <table:table-cell office:value-type="string" calcext:value-type="string">
            <text:p><text:a xlink:href="https://mou.sr/3QT9dgV" xlink:type="simple">https://mou.sr/3QT9dgV</text:a>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GRM155C80J475MEAAJ</text:p>
          </table:table-cell>
          <table:table-cell office:value-type="string" calcext:value-type="string">
            <text:p><text:a xlink:href="https://mou.sr/4tpjte7" xlink:type="simple">https://mou.sr/4tpjte7</text:a>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N5819WS</text:p>
          </table:table-cell>
          <table:table-cell office:value-type="string" calcext:value-type="string">
            <text:p><text:a xlink:href="https://www.digikey.com/en/products/detail/shenzhen-slkormicro-semicon-co-ltd/1N5819WS/26112850" xlink:type="simple">https://www.digikey.com/en/products/detail/shenzhen-slkormicro-semicon-co-ltd/1N5819WS/26112850</text:a>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_C_Receptacle_GCT_USB4105-xx-A_16P_TopMnt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ST_PH_S2B-PH-SM4-TB_1x02-1MP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Mounting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inHeader_1x1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inHeader_1x1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JST_SH_BM04B-SRSS-TB_1x04-1MP_P1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ounting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JST_SH_BM03B-SRSS-TB_1x03-1MP_P1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Mounting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R2, R5, R6, R8</text:p>
          </table:table-cell>
          <table:table-cell office:value-type="string" calcext:value-type="string">
            <text:p>04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C0402JR-7D10KL</text:p>
          </table:table-cell>
          <table:table-cell office:value-type="string" calcext:value-type="string">
            <text:p><text:a xlink:href="https://mou.sr/3Qyq83Z" xlink:type="simple">https://mou.sr/3Qyq83Z</text:a></text:p>
          </table:table-cell>
        </table:table-row>
        <table:table-row table:style-name="ro1">
          <table:table-cell office:value-type="string" calcext:value-type="string">
            <text:p>R10, R7, R9</text:p>
          </table:table-cell>
          <table:table-cell office:value-type="string" calcext:value-type="string">
            <text:p>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C0402JR-075K1P</text:p>
          </table:table-cell>
          <table:table-cell office:value-type="string" calcext:value-type="string">
            <text:p><text:a xlink:href="https://mou.sr/4djlcvs" xlink:type="simple">https://mou.sr/4djlcvs</text:a></text:p>
          </table:table-cell>
        </table:table-row>
        <table:table-row table:style-name="ro1">
          <table:table-cell office:value-type="string" calcext:value-type="string">
            <text:p>R3, R4</text:p>
          </table:table-cell>
          <table:table-cell office:value-type="string" calcext:value-type="string">
            <text:p>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RC0402JR-0722RL</text:p>
          </table:table-cell>
          <table:table-cell office:value-type="string" calcext:value-type="string">
            <text:p><text:a xlink:href="https://mou.sr/3WMWZH5" xlink:type="simple">https://mou.sr/3WMWZH5</text:a>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SPST_PTS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SPST_PTS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RAK3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K3172-T-8-SM-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SOP-10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34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K-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70e089b17412e4cb7773e41413306b17a2328c34</meta:generator>
    <dc:date>2026-05-11T20:27:01.596200602</dc:date>
    <meta:editing-duration>PT27M23S</meta:editing-duration>
    <meta:editing-cycles>30</meta:editing-cycles>
    <meta:document-statistic meta:table-count="1" meta:cell-count="104" meta:object-count="0"/>
  </office:meta>
</office:document-meta>
</file>